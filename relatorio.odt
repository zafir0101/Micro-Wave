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093BBF556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a171" officeooo:paragraph-rsid="000ea17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ea171"/>
    </style:style>
    <style:style style:name="P3" style:family="paragraph" style:parent-style-name="Standard">
      <style:paragraph-properties fo:text-align="center" style:justify-single-word="false"/>
      <style:text-properties officeooo:rsid="000ea171" officeooo:paragraph-rsid="000ea171"/>
    </style:style>
    <style:style style:name="P4" style:family="paragraph" style:parent-style-name="Standard">
      <style:paragraph-properties fo:text-align="start" style:justify-single-word="false"/>
      <style:text-properties fo:font-size="20pt" officeooo:rsid="000ea171" officeooo:paragraph-rsid="000ea171" style:font-size-asian="20pt" style:font-size-complex="20pt"/>
    </style:style>
    <style:style style:name="P5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2pt" officeooo:rsid="000ea171" officeooo:paragraph-rsid="000ea171" style:font-size-asian="12pt" style:font-size-complex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font-size="12pt" fo:font-weight="bold" officeooo:rsid="0010bbc9" officeooo:paragraph-rsid="0010bbc9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officeooo:paragraph-rsid="0010bbc9"/>
    </style:style>
    <style:style style:name="P10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Calibri" fo:font-size="12pt" fo:font-style="normal" fo:font-weight="normal" officeooo:paragraph-rsid="0010bbc9" style:font-size-asian="12pt" style:font-style-asian="normal" style:font-weight-asian="normal"/>
    </style:style>
    <style:style style:name="P11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Calibri" fo:font-size="12pt" fo:font-style="normal" fo:font-weight="bold" officeooo:rsid="0010bbc9" officeooo:paragraph-rsid="0010bbc9" style:font-size-asian="12pt" style:font-style-asian="normal" style:font-weight-asian="bold" style:font-weight-complex="bold"/>
    </style:style>
    <style:style style:name="P12" style:family="paragraph" style:parent-style-name="Default_20_Drawing_20_Style" style:list-style-name="L1">
      <style:paragraph-properties fo:margin-top="0in" fo:margin-bottom="0.0799in" style:contextual-spacing="false" fo:line-height="115%" fo:text-align="justify" style:justify-single-word="false"/>
      <style:text-properties officeooo:paragraph-rsid="0010bbc9"/>
    </style:style>
    <style:style style:name="P13" style:family="paragraph" style:parent-style-name="Standard" style:list-style-name="L1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Calibri" fo:font-size="12pt" fo:font-style="normal" fo:font-weight="normal" officeooo:rsid="0010bbc9" officeooo:paragraph-rsid="0010bbc9" style:font-size-asian="12pt" style:font-style-asian="normal" style:font-weight-asian="normal"/>
    </style:style>
    <style:style style:name="P14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Calibri" fo:font-size="12pt" fo:font-style="normal" fo:font-weight="normal" officeooo:rsid="0010bbc9" officeooo:paragraph-rsid="0010bbc9" style:font-size-asian="12pt" style:font-style-asian="normal" style:font-weight-asian="normal"/>
    </style:style>
    <style:style style:name="P15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Calibri" fo:font-size="12pt" fo:font-weight="normal" officeooo:paragraph-rsid="0010bbc9" style:font-size-asian="12pt" style:font-weight-asian="normal"/>
    </style:style>
    <style:style style:name="P1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Calibri" fo:font-size="12pt" fo:font-weight="bold" officeooo:rsid="0010bbc9" officeooo:paragraph-rsid="0010bbc9" style:font-size-asian="12pt" style:font-weight-asian="bold" style:font-weight-complex="bold"/>
    </style:style>
    <style:style style:name="P1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Calibri" fo:font-size="12pt" fo:font-weight="normal" officeooo:rsid="0010bbc9" officeooo:paragraph-rsid="0010bbc9" style:font-size-asian="12pt" style:font-weight-asian="normal" style:font-weight-complex="normal"/>
    </style:style>
    <style:style style:name="P18" style:family="paragraph" style:parent-style-name="Standard">
      <style:paragraph-properties fo:margin-top="0in" fo:margin-bottom="0.0799in" style:contextual-spacing="false" fo:text-align="start" style:justify-single-word="false"/>
      <style:text-properties fo:color="#000000" loext:opacity="100%" style:font-name="Calibri" fo:font-size="12pt" fo:font-style="normal" fo:font-weight="normal" officeooo:paragraph-rsid="0010bbc9" style:font-size-asian="12pt" style:font-style-asian="normal" style:font-weight-asian="normal"/>
    </style:style>
    <style:style style:name="P19" style:family="paragraph" style:parent-style-name="Standard">
      <style:paragraph-properties fo:margin-top="0in" fo:margin-bottom="0.0799in" style:contextual-spacing="false" fo:text-align="start" style:justify-single-word="false"/>
      <style:text-properties fo:color="#000000" loext:opacity="100%" style:font-name="Calibri" fo:font-size="12pt" fo:font-weight="normal" officeooo:paragraph-rsid="0010bbc9" style:font-size-asian="12pt" style:font-weight-asian="normal"/>
    </style:style>
    <style:style style:name="T1" style:family="text">
      <style:text-properties fo:font-size="15pt" fo:font-weight="bold" style:font-size-asian="13pt" style:font-weight-asian="bold" style:font-size-complex="15pt" style:font-weight-complex="bold"/>
    </style:style>
    <style:style style:name="T2" style:family="text">
      <style:text-properties fo:font-size="12pt" fo:font-weight="bold" officeooo:rsid="0010bbc9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Calibri" fo:font-size="12pt" fo:font-weight="normal" style:font-size-asian="12pt" style:font-weight-asian="normal"/>
    </style:style>
    <style:style style:name="T5" style:family="text">
      <style:text-properties fo:color="#000000" loext:opacity="100%" style:font-name="Calibri" fo:font-size="12pt" fo:font-style="normal" fo:font-weight="bold" officeooo:rsid="0010bbc9" style:font-size-asian="12pt" style:font-style-asian="normal" style:font-weight-asian="bold" style:font-weight-complex="bold"/>
    </style:style>
    <style:style style:name="T6" style:family="text">
      <style:text-properties fo:color="#000000" loext:opacity="100%" style:font-name="Calibri" fo:font-size="12pt" fo:font-style="italic" fo:font-weight="normal" style:font-size-asian="12pt" style:font-style-asian="italic" style:font-weight-asian="normal"/>
    </style:style>
    <style:style style:name="T7" style:family="text">
      <style:text-properties fo:color="#000000" loext:opacity="100%" style:font-name="Calibri" fo:font-size="12pt" fo:font-style="normal" fo:font-weight="normal" officeooo:rsid="0010bbc9" style:font-size-asian="12pt" style:font-style-asian="normal" style:font-weight-asian="normal"/>
    </style:style>
    <style:style style:name="T8" style:family="text">
      <style:text-properties fo:color="#000000" loext:opacity="100%" style:font-name="Calibri" fo:font-size="12pt" fo:font-style="italic" fo:font-weight="normal" officeooo:rsid="0010bbc9" style:font-size-asian="12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0.344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47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354in" svg:y="-0.7874in" svg:width="8.1693in" svg:height="1.1472in" draw:z-index="0"><draw:image xlink:href="Pictures/100000010000041700000093BBF556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ação de projeto: Micro-ondas</text:p>
      <text:p text:style-name="P1">Cliente: INE54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lorianópolis, 27 de Junho de 2026</text:p>
      <text:p text:style-name="P4"><draw:frame draw:style-name="fr1" draw:name="Image1 Copy 1" text:anchor-type="char" svg:x="-0.7354in" svg:y="-0.7874in" svg:width="8.1693in" svg:height="1.1472in" draw:z-index="1"><draw:image xlink:href="Pictures/100000010000041700000093BBF5567C.png" xlink:type="simple" xlink:show="embed" xlink:actuate="onLoad" draw:mime-type="image/png"/></draw:frame><text:soft-page-break/>Sumário</text:p>
      <text:p text:style-name="P4"/>
      <text:p text:style-name="P5">1. Informações Gerais...........................................................................................................................3</text:p>
      <text:p text:style-name="P5"><text:s text:c="4"/>Objetivo............................................................................................................................................3</text:p>
      <text:p text:style-name="P5"><text:s text:c="4"/>Escopo do Trabalho Realizado.........................................................................................................3</text:p>
      <text:p text:style-name="P5">2. Detalhamento do Projeto..................................................................................................................3</text:p>
      <text:p text:style-name="P5"><text:s text:c="4"/>Planejamento....................................................................................................................................3</text:p>
      <text:p text:style-name="P5"><text:s text:c="4"/>Manual de Simulação do Firmware: Importância e Diretrizes.........................................................x</text:p>
      <text:p text:style-name="P5">3. Considerações Finais........................................................................................................................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3" draw:name="Text Frame 1" draw:style-name="gr1" draw:text-style-name="P7" svg:width="2.0331in" svg:height="0.3449in" svg:x="-0.3in" svg:y="0.3957in"><draw:text-box><text:p text:style-name="P6"><text:span text:style-name="T1">1. Informações Gerais</text:span></text:p></draw:text-box></draw:frame><draw:frame draw:style-name="fr1" draw:name="Image1 Copy 2" text:anchor-type="char" svg:x="-0.7354in" svg:y="-0.7508in" svg:width="8.1693in" svg:height="1.1472in" draw:z-index="2"><draw:image xlink:href="Pictures/100000010000041700000093BBF5567C.png" xlink:type="simple" xlink:show="embed" xlink:actuate="onLoad" draw:mime-type="image/png"/></draw:frame><text:soft-page-break/></text:p>
      <text:p text:style-name="P5"/>
      <text:p text:style-name="P8">Objetivo</text:p>
      <text:p text:style-name="P9"><text:span text:style-name="T2"><text:tab/></text:span><text:span text:style-name="T3">Este documento tem como objetivo descrever o processo de desenvolvimento e o modo de operação do projeto de firmware do micro-ondas</text:span><text:span text:style-name="T4">, conforme solicitado pela equipe técnica do </text:span><text:span text:style-name="T3">cliente INE5411. Este projeto tem como funcionalidade permitir o uso seguro do equipamento.</text:span></text:p>
      <text:p text:style-name="P10"/>
      <text:p text:style-name="P11">Escopo do Trabalho Realizado</text:p>
      <text:p text:style-name="P9"><text:span text:style-name="T5"><text:tab/></text:span><text:span text:style-name="T3">O <text:s text:c="2"/>serviço <text:s text:c="2"/>prestado <text:s text:c="2"/>compreende <text:s text:c="2"/>o <text:s text:c="2"/>desenvolvimento <text:s text:c="2"/>e <text:s text:c="2"/>implementação <text:s text:c="2"/>de <text:s text:c="2"/>um <text:s text:c="2"/>firmware, escrito em linguagem </text:span><text:span text:style-name="T6">Assembly </text:span><text:span text:style-name="T4">para o processador MIPS, destinado a realizar as funcionalidades de </text:span><text:span text:style-name="T3">permitir o consumidor a inserir um tempo de cozimento; a inicar pausar e cancelar o cozimento; e também precisa verificar o sensor de porta do micro-ondas e emitir um aviso ao final do cozimento. O documento de especificação foi fornecido pela equipe técnica do cliente, orientando as implementações necessárias. Assim, o escopo do trabalho contratado </text:span><text:span text:style-name="T7">inclui:</text:span></text:p>
      <text:list text:style-name="L1">
        <text:list-item>
          <text:p text:style-name="P12"><text:span text:style-name="T7">Elaboração do projeto do firmware para ser embarcado em um micro-ondas </text:span><text:span text:style-name="T3">atendendo aos requisitos do documento de especificação fornecido pela equipe técnica do </text:span><text:span text:style-name="T7">cliente;</text:span></text:p>
        </text:list-item>
        <text:list-item>
          <text:p text:style-name="P12"><text:span text:style-name="T7">Implementação do firmware em linguagem </text:span><text:span text:style-name="T8">Assembly </text:span><text:span text:style-name="T7">para o processador MIPS, com o </text:span><text:span text:style-name="T8">part </text:span><text:span text:style-name="T6">number </text:span><text:span text:style-name="T4">especificado pela equipe técnica do cliente;</text:span></text:p>
        </text:list-item>
        <text:list-item>
          <text:p text:style-name="P12"><text:span text:style-name="T7">Simulação das funcionalidades implementadas para validação do funcionamento, utilizando </text:span><text:span text:style-name="T3">o simulador MARS como ferramenta; </text:span></text:p>
        </text:list-item>
        <text:list-item>
          <text:p text:style-name="P12"><text:span text:style-name="T7">Elaboração de documentação técnica que descreve o processo de planejamento e </text:span><text:span text:style-name="T3">implementação do firmware; e</text:span></text:p>
        </text:list-item>
        <text:list-item>
          <text:p text:style-name="P13">Entrega dos arquivod-fonte do projeto.</text:p>
        </text:list-item>
      </text:list>
      <text:p text:style-name="P14"><draw:frame text:anchor-type="paragraph" draw:z-index="4" draw:name="Text Frame 2" draw:style-name="gr2" draw:text-style-name="P7" svg:width="3.4016in" svg:height="0.4803in" svg:x="-0.3925in" svg:y="0.1236in"><draw:text-box><text:p text:style-name="P6"><text:span text:style-name="T1">2. Detalhamento do Projeto</text:span></text:p></draw:text-box></draw:frame></text:p>
      <text:p text:style-name="P15"/>
      <text:p text:style-name="P16">Planejamento</text:p>
      <text:p text:style-name="P17"><text:tab/></text:p>
      <text:p text:style-name="P18"/>
      <text:p text:style-name="P19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Cambria" style:font-family-complex="Cambria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ea171" officeooo:paragraph-rsid="000ea171"/>
    </style:style>
    <style:page-layout style:name="Mpm1">
      <style:page-layout-properties fo:page-width="8.2681in" fo:page-height="11.6929in" style:num-format="1" style:print-orientation="portrait" fo:margin-top="0.7874in" fo:margin-bottom="0.47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21:56:58.608663489</meta:creation-date>
    <dc:date>2026-06-27T22:17:09.394612129</dc:date>
    <meta:editing-duration>PT9M28S</meta:editing-duration>
    <meta:editing-cycles>2</meta:editing-cycles>
    <meta:generator>LibreOffice/25.2.7.2$Linux_X86_64 LibreOffice_project/520$Build-2</meta:generator>
    <meta:document-statistic meta:table-count="0" meta:image-count="3" meta:object-count="0" meta:page-count="3" meta:paragraph-count="23" meta:word-count="248" meta:character-count="2531" meta:non-whitespace-character-count="2269"/>
  </office:meta>
</office:document-meta>
</file>