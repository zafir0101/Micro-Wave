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B000001AF959AFB6E.png" manifest:media-type="image/png"/>
  <manifest:file-entry manifest:full-path="Pictures/1000000100000025000000234738317D.png" manifest:media-type="image/png"/>
  <manifest:file-entry manifest:full-path="Pictures/100000010000002500000023A86AEB44.png" manifest:media-type="image/png"/>
  <manifest:file-entry manifest:full-path="Pictures/10000000000001AF00000203B41024F1.jpg" manifest:media-type="image/jpeg"/>
  <manifest:file-entry manifest:full-path="Pictures/10000001000002D500000160C5C0D686.png" manifest:media-type="image/png"/>
  <manifest:file-entry manifest:full-path="Pictures/100000010000041700000093BBF556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mbria" svg:font-family="Cambr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ea171" officeooo:paragraph-rsid="000ea171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paragraph-rsid="000ea171"/>
    </style:style>
    <style:style style:name="P3" style:family="paragraph" style:parent-style-name="Standard">
      <style:paragraph-properties fo:text-align="center" style:justify-single-word="false"/>
      <style:text-properties officeooo:rsid="000ea171" officeooo:paragraph-rsid="000ea171"/>
    </style:style>
    <style:style style:name="P4" style:family="paragraph" style:parent-style-name="Standard">
      <style:paragraph-properties fo:text-align="start" style:justify-single-word="false"/>
      <style:text-properties fo:font-size="20pt" officeooo:rsid="000ea171" officeooo:paragraph-rsid="000ea171" style:font-size-asian="20pt" style:font-size-complex="20pt"/>
    </style:style>
    <style:style style:name="P5" style:family="paragraph" style:parent-style-name="Standard">
      <style:paragraph-properties fo:margin-top="0in" fo:margin-bottom="0.0799in" style:contextual-spacing="false" fo:text-align="start" style:justify-single-word="false"/>
      <style:text-properties fo:font-size="12pt" officeooo:rsid="000ea171" officeooo:paragraph-rsid="000ea171" style:font-size-asian="12pt" style:font-size-complex="12pt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in" fo:margin-bottom="0.0799in" style:contextual-spacing="false" fo:line-height="115%" fo:text-align="start" style:justify-single-word="false"/>
      <style:text-properties fo:font-size="12pt" fo:font-weight="bold" officeooo:rsid="0010bbc9" officeooo:paragraph-rsid="0010bbc9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officeooo:paragraph-rsid="0010bbc9"/>
    </style:style>
    <style:style style:name="P9" style:family="paragraph" style:parent-style-name="Standard">
      <style:paragraph-properties fo:margin-top="0in" fo:margin-bottom="0.0799in" style:contextual-spacing="false" fo:line-height="115%" fo:text-align="start" style:justify-single-word="false"/>
      <style:text-properties fo:color="#000000" loext:opacity="100%" style:font-name="Liberation Serif" fo:font-size="12pt" fo:font-style="normal" fo:font-weight="normal" officeooo:paragraph-rsid="0010bbc9" style:font-size-asian="12pt" style:font-style-asian="normal" style:font-weight-asian="normal"/>
    </style:style>
    <style:style style:name="P10" style:family="paragraph" style:parent-style-name="Standard">
      <style:paragraph-properties fo:margin-top="0in" fo:margin-bottom="0.0799in" style:contextual-spacing="false" fo:line-height="115%" fo:text-align="start" style:justify-single-word="false"/>
      <style:text-properties fo:color="#000000" loext:opacity="100%" style:font-name="Liberation Serif" fo:font-size="12pt" fo:font-style="normal" fo:font-weight="bold" officeooo:rsid="0010bbc9" officeooo:paragraph-rsid="0010bbc9" style:font-size-asian="12pt" style:font-style-asian="normal" style:font-weight-asian="bold" style:font-weight-complex="bold"/>
    </style:style>
    <style:style style:name="P11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style:font-name="Liberation Serif" officeooo:paragraph-rsid="0010bbc9"/>
    </style:style>
    <style:style style:name="P12" style:family="paragraph" style:parent-style-name="Default_20_Drawing_20_Style" style:list-style-name="L1">
      <style:paragraph-properties fo:margin-top="0in" fo:margin-bottom="0.0799in" style:contextual-spacing="false" fo:line-height="115%" fo:text-align="justify" style:justify-single-word="false"/>
      <style:text-properties style:font-name="Liberation Serif" officeooo:paragraph-rsid="0010bbc9"/>
    </style:style>
    <style:style style:name="P13" style:family="paragraph" style:parent-style-name="Standard" style:list-style-name="L1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0bbc9" officeooo:paragraph-rsid="0010bbc9" style:font-size-asian="12pt" style:font-style-asian="normal" style:font-weight-asian="normal"/>
    </style:style>
    <style:style style:name="P14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0bbc9" officeooo:paragraph-rsid="0010bbc9" style:font-size-asian="12pt" style:font-style-asian="normal" style:font-weight-asian="normal"/>
    </style:style>
    <style:style style:name="P15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6pt" fo:font-weight="bold" officeooo:rsid="0014ea49" officeooo:paragraph-rsid="0010bbc9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weight="bold" officeooo:rsid="0014ea49" officeooo:paragraph-rsid="0014ea49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weight="normal" officeooo:rsid="0010bbc9" officeooo:paragraph-rsid="0010bbc9" style:font-size-asian="12pt" style:font-weight-asian="normal" style:font-weight-complex="normal"/>
    </style:style>
    <style:style style:name="P18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2fcaf" officeooo:paragraph-rsid="0010bbc9" style:font-size-asian="12pt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2fcaf" officeooo:paragraph-rsid="0012fcaf" style:font-size-asian="12pt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paragraph-rsid="0012fcaf" style:font-size-asian="12pt" style:font-style-asian="normal" style:font-weight-asian="normal"/>
    </style:style>
    <style:style style:name="P21" style:family="paragraph" style:parent-style-name="Standard" style:list-style-name="L2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31747" officeooo:paragraph-rsid="0012fcaf" style:font-size-asian="12pt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bold" officeooo:rsid="0014ea49" officeooo:paragraph-rsid="0014ea49" style:font-size-asian="12pt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31747" officeooo:paragraph-rsid="0012fcaf" style:font-size-asian="12pt" style:font-style-asian="normal" style:font-weight-asian="normal" style:font-style-complex="normal" style:font-weight-complex="normal"/>
    </style:style>
    <style:style style:name="P24" style:family="paragraph" style:parent-style-name="Standard" style:list-style-name="L3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3c130" officeooo:paragraph-rsid="0013c130" style:font-size-asian="12pt" style:font-style-asian="normal" style:font-weight-asian="normal" style:font-style-complex="normal" style:font-weight-complex="normal"/>
    </style:style>
    <style:style style:name="P25" style:family="paragraph" style:parent-style-name="Standard" style:list-style-name="L3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italic" fo:font-weight="normal" officeooo:rsid="0013c130" officeooo:paragraph-rsid="0013c130" style:font-size-asian="12pt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italic" fo:font-weight="normal" officeooo:rsid="0013c130" officeooo:paragraph-rsid="0013c130" style:font-size-asian="12pt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italic" fo:font-weight="normal" officeooo:rsid="00167787" officeooo:paragraph-rsid="00167787" style:font-size-asian="12pt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margin-top="0in" fo:margin-bottom="0.0799in" style:contextual-spacing="false" fo:line-height="115%" fo:text-align="center" style:justify-single-word="false"/>
      <style:text-properties fo:color="#000000" loext:opacity="100%" style:font-name="Liberation Serif" fo:font-size="12pt" fo:font-style="italic" fo:font-weight="normal" officeooo:rsid="00187111" officeooo:paragraph-rsid="00187111" style:font-size-asian="12pt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italic" fo:font-weight="normal" officeooo:rsid="00167787" officeooo:paragraph-rsid="00187111" style:font-size-asian="12pt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87111" officeooo:paragraph-rsid="00187111" style:font-size-asian="12pt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top="0in" fo:margin-bottom="0.0799in" style:contextual-spacing="false" fo:line-height="115%" fo:text-align="center" style:justify-single-word="false"/>
      <style:text-properties fo:color="#000000" loext:opacity="100%" style:font-name="Liberation Serif" fo:font-size="12pt" fo:font-style="italic" fo:font-weight="normal" officeooo:rsid="001932d8" officeooo:paragraph-rsid="001932d8" style:font-size-asian="12pt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bold" officeooo:rsid="001932d8" officeooo:paragraph-rsid="001932d8" style:font-size-asian="12pt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bold" officeooo:rsid="001aabc8" officeooo:paragraph-rsid="001aabc8" style:font-size-asian="12pt" style:font-style-asian="normal" style:font-weight-asian="bold" style:font-style-complex="normal" style:font-weight-complex="bold"/>
    </style:style>
    <style:style style:name="P34" style:family="paragraph" style:parent-style-name="Standard" style:list-style-name="L4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b93bf" officeooo:paragraph-rsid="001b93bf" style:font-size-asian="12pt" style:font-style-asian="normal" style:font-weight-asian="normal" style:font-style-complex="normal" style:font-weight-complex="normal"/>
    </style:style>
    <style:style style:name="P35" style:family="paragraph" style:parent-style-name="Standard" style:list-style-name="L4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d5668" officeooo:paragraph-rsid="001d5668" style:font-size-asian="12pt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margin-top="0in" fo:margin-bottom="0.0799in" style:contextual-spacing="false" fo:line-height="115%" fo:text-align="center" style:justify-single-word="false"/>
      <style:text-properties fo:color="#000000" loext:opacity="100%" style:font-name="Liberation Serif" fo:font-size="12pt" fo:font-style="italic" fo:font-weight="normal" officeooo:rsid="001e21c8" officeooo:paragraph-rsid="001e21c8" style:font-size-asian="12pt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bold" officeooo:rsid="001e21c8" officeooo:paragraph-rsid="001e21c8" style:font-size-asian="12pt" style:font-style-asian="normal" style:font-weight-asian="bold" style:font-style-complex="normal" style:font-weight-complex="bold"/>
    </style:style>
    <style:style style:name="P38" style:family="paragraph" style:parent-style-name="Standard" style:list-style-name="L5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bold" officeooo:rsid="001e21c8" officeooo:paragraph-rsid="001e21c8" style:font-size-asian="12pt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e21c8" officeooo:paragraph-rsid="001e21c8" style:font-size-asian="12pt" style:font-style-asian="normal" style:font-weight-asian="normal" style:font-style-complex="normal" style:font-weight-complex="normal"/>
    </style:style>
    <style:style style:name="P40" style:family="paragraph" style:parent-style-name="Text_20_body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e64e9" officeooo:paragraph-rsid="001e64e9" style:font-size-asian="12pt" style:font-style-asian="normal" style:font-weight-asian="normal" style:font-style-complex="normal" style:font-weight-complex="normal"/>
    </style:style>
    <style:style style:name="P41" style:family="paragraph" style:parent-style-name="Text_20_body" style:list-style-name="L6">
      <style:paragraph-properties fo:margin-top="0in" fo:margin-bottom="0.0799in" style:contextual-spacing="false" fo:text-align="justify" style:justify-single-word="false"/>
      <style:text-properties fo:color="#000000" loext:opacity="100%" officeooo:rsid="001e64e9" style:font-size-asian="12pt"/>
    </style:style>
    <style:style style:name="P42" style:family="paragraph" style:parent-style-name="Text_20_body">
      <style:paragraph-properties fo:margin-top="0in" fo:margin-bottom="0.0799in" style:contextual-spacing="false" fo:text-align="justify" style:justify-single-word="false"/>
      <style:text-properties fo:color="#000000" loext:opacity="100%" officeooo:rsid="001e64e9" style:font-size-asian="12pt"/>
    </style:style>
    <style:style style:name="P43" style:family="paragraph" style:parent-style-name="Text_20_body">
      <style:paragraph-properties fo:margin-top="0in" fo:margin-bottom="0.0799in" style:contextual-spacing="false" fo:text-align="justify" style:justify-single-word="false"/>
      <style:text-properties fo:color="#000000" loext:opacity="100%" fo:font-weight="bold" officeooo:rsid="001e64e9" style:font-size-asian="12pt"/>
    </style:style>
    <style:style style:name="P44" style:family="paragraph" style:parent-style-name="Text_20_body" style:list-style-name="L7">
      <style:paragraph-properties fo:margin-top="0in" fo:margin-bottom="0.0799in" style:contextual-spacing="false" fo:text-align="justify" style:justify-single-word="false"/>
      <style:text-properties fo:color="#000000" loext:opacity="100%" officeooo:rsid="001e64e9" style:font-size-asian="12pt"/>
    </style:style>
    <style:style style:name="P45" style:family="paragraph" style:parent-style-name="Text_20_body">
      <style:paragraph-properties fo:margin-top="0in" fo:margin-bottom="0.0799in" style:contextual-spacing="false" fo:text-align="justify" style:justify-single-word="false"/>
      <style:text-properties fo:color="#000000" loext:opacity="100%" style:font-name="Liberation Serif" fo:font-size="12pt" fo:font-style="normal" fo:font-weight="normal" officeooo:rsid="001e64e9" style:font-size-asian="12pt" style:font-style-asian="normal" style:font-weight-asian="normal" style:font-style-complex="normal" style:font-weight-complex="normal"/>
    </style:style>
    <style:style style:name="T1" style:family="text">
      <style:text-properties officeooo:rsid="0014ea49"/>
    </style:style>
    <style:style style:name="T2" style:family="text">
      <style:text-properties officeooo:rsid="001e64e9"/>
    </style:style>
    <style:style style:name="T3" style:family="text">
      <style:text-properties officeooo:rsid="0021c2e5"/>
    </style:style>
    <style:style style:name="T4" style:family="text">
      <style:text-properties fo:font-size="15pt" fo:font-weight="bold" style:font-size-asian="13pt" style:font-weight-asian="bold" style:font-size-complex="15pt" style:font-weight-complex="bold"/>
    </style:style>
    <style:style style:name="T5" style:family="text">
      <style:text-properties fo:font-size="12pt" fo:font-weight="bold" officeooo:rsid="0010bbc9" style:font-size-asian="12pt" style:font-weight-asian="bold" style:font-size-complex="12pt" style:font-weight-complex="bold"/>
    </style:style>
    <style:style style:name="T6" style:family="text">
      <style:text-properties fo:color="#000000" loext:opacity="100%" fo:font-family="Calibri" style:font-family-generic="roman" style:font-pitch="variable" fo:font-size="12pt" fo:font-style="normal" fo:font-weight="normal" style:font-size-asian="12pt" style:font-style-asian="normal" style:font-weight-asian="normal"/>
    </style:style>
    <style:style style:name="T7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/>
    </style:style>
    <style:style style:name="T8" style:family="text">
      <style:text-properties fo:color="#000000" loext:opacity="100%" style:font-name="Liberation Serif" fo:font-size="12pt" fo:font-weight="normal" style:font-size-asian="12pt" style:font-weight-asian="normal"/>
    </style:style>
    <style:style style:name="T9" style:family="text">
      <style:text-properties fo:color="#000000" loext:opacity="100%" fo:font-size="12pt" fo:font-style="normal" fo:font-weight="normal" style:font-size-asian="12pt" style:font-style-asian="normal" style:font-weight-asian="normal"/>
    </style:style>
    <style:style style:name="T10" style:family="text">
      <style:text-properties fo:color="#000000" loext:opacity="100%" fo:font-size="12pt" fo:font-style="italic" fo:font-weight="normal" style:font-size-asian="12pt" style:font-style-asian="italic" style:font-weight-asian="normal"/>
    </style:style>
    <style:style style:name="T11" style:family="text">
      <style:text-properties fo:color="#000000" loext:opacity="100%" fo:font-size="12pt" fo:font-weight="normal" style:font-size-asian="12pt" style:font-weight-asian="normal"/>
    </style:style>
    <style:style style:name="T12" style:family="text">
      <style:text-properties fo:color="#000000" loext:opacity="100%" fo:font-size="12pt" fo:font-style="normal" fo:font-weight="normal" officeooo:rsid="0010bbc9" style:font-size-asian="12pt" style:font-style-asian="normal" style:font-weight-asian="normal"/>
    </style:style>
    <style:style style:name="T13" style:family="text">
      <style:text-properties fo:color="#000000" loext:opacity="100%" fo:font-size="12pt" fo:font-style="italic" fo:font-weight="normal" officeooo:rsid="0010bbc9" style:font-size-asian="12pt" style:font-style-asian="italic" style:font-weight-asian="normal"/>
    </style:style>
    <style:style style:name="T14" style:family="text">
      <style:text-properties officeooo:rsid="00128a60"/>
    </style:style>
    <style:style style:name="T15" style:family="text">
      <style:text-properties fo:font-style="italic" officeooo:rsid="00128a60" style:font-style-asian="italic" style:font-style-complex="italic"/>
    </style:style>
    <style:style style:name="T16" style:family="text">
      <style:text-properties fo:font-style="normal" officeooo:rsid="00128a60" style:font-style-asian="normal" style:font-style-complex="normal"/>
    </style:style>
    <style:style style:name="T17" style:family="text">
      <style:text-properties fo:font-style="normal" officeooo:rsid="002372e0" style:font-style-asian="normal" style:font-style-complex="normal"/>
    </style:style>
    <style:style style:name="T18" style:family="text">
      <style:text-properties fo:font-style="normal" officeooo:rsid="0012fcaf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20a602"/>
    </style:style>
    <style:style style:name="T21" style:family="text">
      <style:text-properties officeooo:rsid="00131747"/>
    </style:style>
    <style:style style:name="T22" style:family="text">
      <style:text-properties officeooo:rsid="0012fcaf" style:font-style-complex="normal" style:font-weight-complex="normal"/>
    </style:style>
    <style:style style:name="T23" style:family="text">
      <style:text-properties officeooo:rsid="00131747" style:font-style-complex="normal" style:font-weight-complex="normal"/>
    </style:style>
    <style:style style:name="T24" style:family="text">
      <style:text-properties officeooo:rsid="0013c130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2032b3" style:font-style-asian="normal" style:font-style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weight="normal" officeooo:rsid="001aabc8" style:font-weight-asian="normal" style:font-weight-complex="normal"/>
    </style:style>
    <style:style style:name="T30" style:family="text">
      <style:text-properties fo:font-weight="normal" officeooo:rsid="001b93bf" style:font-weight-asian="normal" style:font-weight-complex="normal"/>
    </style:style>
    <style:style style:name="T31" style:family="text">
      <style:text-properties fo:font-style="italic" fo:font-weight="normal" officeooo:rsid="001b93bf" style:font-style-asian="italic" style:font-weight-asian="normal" style:font-style-complex="italic" style:font-weight-complex="normal"/>
    </style:style>
    <style:style style:name="T32" style:family="text">
      <style:text-properties fo:font-weight="normal" officeooo:rsid="0020a602" style:font-weight-asian="normal" style:font-weight-complex="normal"/>
    </style:style>
    <style:style style:name="T33" style:family="text">
      <style:text-properties officeooo:rsid="001d5668"/>
    </style:style>
    <style:style style:name="T34" style:family="text">
      <style:text-properties fo:font-weight="normal" officeooo:rsid="002372e0" style:font-weight-asian="normal" style:font-weight-complex="normal"/>
    </style:style>
    <style:style style:name="T35" style:family="text">
      <style:text-properties fo:font-weight="bold"/>
    </style:style>
    <style:style style:name="T36" style:family="text">
      <style:text-properties fo:font-style="italic"/>
    </style:style>
    <style:style style:name="T37" style:family="text">
      <style:text-properties officeooo:rsid="002032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draw:fill="none" draw:fill-color="#ffffff" fo:min-height="0.344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0.7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fo:min-height="0.47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7354in" svg:y="-0.7874in" svg:width="8.1693in" svg:height="1.1472in" draw:z-index="0"><draw:image xlink:href="Pictures/100000010000041700000093BBF5567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Documentação de projeto: Micro-ondas</text:p>
      <text:p text:style-name="P1">Cliente: INE541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Florianópolis, 27 de Junho de 2026</text:p>
      <text:p text:style-name="P4"><draw:frame draw:style-name="fr1" draw:name="Image1 Copy 1" text:anchor-type="char" svg:x="-0.7354in" svg:y="-0.7874in" svg:width="8.1693in" svg:height="1.1472in" draw:z-index="1"><draw:image xlink:href="Pictures/100000010000041700000093BBF5567C.png" xlink:type="simple" xlink:show="embed" xlink:actuate="onLoad" draw:mime-type="image/png"/></draw:frame><text:soft-page-break/>Sumário</text:p>
      <text:p text:style-name="P4"/>
      <text:p text:style-name="P5">1. Informações Gerais...........................................................................................................................3</text:p>
      <text:p text:style-name="P5"><text:s text:c="4"/>Objetivo............................................................................................................................................3</text:p>
      <text:p text:style-name="P5"><text:s text:c="4"/>Escopo do Trabalho Realizado.........................................................................................................3</text:p>
      <text:p text:style-name="P5">2. Detalhamento do Projeto..................................................................................................................3</text:p>
      <text:p text:style-name="P5"><text:s text:c="4"/><text:span text:style-name="T1">2.1 </text:span>Planejamento..............................................................................................................................3</text:p>
      <text:p text:style-name="P5"><text:s text:c="4"/><text:span text:style-name="T1">2.2 </text:span>Manual de Simulação do Firmware: Importância e Diretrizes...................................................<text:span text:style-name="T2">5</text:span></text:p>
      <text:p text:style-name="P5">3. Considerações Finais........................................................................................................................<text:span text:style-name="T3">6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text:anchor-type="paragraph" draw:z-index="3" draw:name="Text Frame 1" draw:style-name="gr1" draw:text-style-name="P6" svg:width="2.0331in" svg:height="0.3449in" svg:x="-0.3in" svg:y="0.3957in"><draw:text-box><text:p><text:span text:style-name="T4">1. Informações Gerais</text:span></text:p></draw:text-box></draw:frame><draw:frame draw:style-name="fr1" draw:name="Image1 Copy 2" text:anchor-type="char" svg:x="-0.7354in" svg:y="-0.7508in" svg:width="8.1693in" svg:height="1.1472in" draw:z-index="2"><draw:image xlink:href="Pictures/100000010000041700000093BBF5567C.png" xlink:type="simple" xlink:show="embed" xlink:actuate="onLoad" draw:mime-type="image/png"/></draw:frame><text:soft-page-break/></text:p>
      <text:p text:style-name="P5"/>
      <text:p text:style-name="P7">Objetivo</text:p>
      <text:p text:style-name="P8"><text:span text:style-name="T5"><text:tab/></text:span><text:span text:style-name="T6">E</text:span><text:span text:style-name="T7">ste documento tem como objetivo descrever o processo de desenvolvimento e o modo de operação do projeto de firmware do micro-ondas</text:span><text:span text:style-name="T8">, conforme solicitado pela equipe técnica do </text:span><text:span text:style-name="T7">cliente INE5411. Este projeto tem como funcionalidade permitir o uso seguro do equipamento.</text:span></text:p>
      <text:p text:style-name="P9"/>
      <text:p text:style-name="P10">Escopo do Trabalho Realizado</text:p>
      <text:p text:style-name="P11"><text:span text:style-name="T9">O <text:s text:c="2"/>serviço <text:s text:c="2"/>prestado <text:s text:c="2"/>compreende <text:s text:c="2"/>o <text:s text:c="2"/>desenvolvimento <text:s text:c="2"/>e <text:s text:c="2"/>implementação <text:s text:c="2"/>de <text:s text:c="2"/>um firmware, escrito em linguagem </text:span><text:span text:style-name="T10">Assembly </text:span><text:span text:style-name="T11">para o processador MIPS, destinado a realizar as funcionalidades de </text:span><text:span text:style-name="T9">permitir o consumidor a inserir um tempo de cozimento; a inicar, pausar e cancelar o cozimento; e também verificar o sensor de porta do micro-ondas e emitir um aviso ao final do cozimento. O documento de especificação foi fornecido pela equipe técnica do cliente, orientando as implementações necessárias. Assim, o escopo do trabalho contratado </text:span><text:span text:style-name="T12">inclui:</text:span></text:p>
      <text:list text:style-name="L1">
        <text:list-item>
          <text:p text:style-name="P12"><text:span text:style-name="T12">Elaboração do projeto do firmware para ser embarcado em um micro-ondas </text:span><text:span text:style-name="T9">atendendo aos requisitos do documento de especificação fornecido pela equipe técnica do </text:span><text:span text:style-name="T12">cliente;</text:span></text:p>
        </text:list-item>
        <text:list-item>
          <text:p text:style-name="P12"><text:span text:style-name="T12">Implementação do firmware em linguagem </text:span><text:span text:style-name="T13">Assembly </text:span><text:span text:style-name="T12">para o processador MIPS, com o </text:span><text:span text:style-name="T13">part </text:span><text:span text:style-name="T10">number </text:span><text:span text:style-name="T11">especificado pela equipe técnica do cliente;</text:span></text:p>
        </text:list-item>
        <text:list-item>
          <text:p text:style-name="P12"><text:span text:style-name="T12">Simulação das funcionalidades implementadas para validação do funcionamento, utilizando </text:span><text:span text:style-name="T9">o simulador MARS como ferramenta; </text:span></text:p>
        </text:list-item>
        <text:list-item>
          <text:p text:style-name="P12"><text:span text:style-name="T12">Elaboração de documentação técnica que descreve o processo de planejamento e </text:span><text:span text:style-name="T9">implementação do firmware; e</text:span></text:p>
        </text:list-item>
        <text:list-item>
          <text:p text:style-name="P13">Entrega dos arquivo<text:span text:style-name="T14">s</text:span>-fonte do projeto.</text:p>
        </text:list-item>
      </text:list>
      <text:p text:style-name="P14"><draw:frame text:anchor-type="paragraph" draw:z-index="4" draw:name="Text Frame 2" draw:style-name="gr2" draw:text-style-name="P6" svg:width="3.4016in" svg:height="0.7197in" svg:x="-0.3925in" svg:y="0.1236in"><draw:text-box><text:p><text:span text:style-name="T4">2. Detalhamento do Projeto</text:span></text:p><text:p><text:span text:style-name="T4"/></text:p><text:p><text:span text:style-name="T4"><text:s text:c="3"/>2.1 Planejamento</text:span></text:p></draw:text-box></draw:frame></text:p>
      <text:p text:style-name="P15"/>
      <text:p text:style-name="P15"/>
      <text:p text:style-name="P16">Interação com o teclado e visor</text:p>
      <text:p text:style-name="P17"><text:tab/><text:span text:style-name="T14">O </text:span><text:span text:style-name="T15">firmware</text:span><text:span text:style-name="T16"> do micro-ondas pode ser divi</text:span><text:span text:style-name="T17">di</text:span><text:span text:style-name="T16">do em duas partes pr</text:span><text:span text:style-name="T17">i</text:span><text:span text:style-name="T16">ncipais: a gerência de seu estado interno, e a interface com o teclado físico. Logo, para facilitar o desenvolvimento, </text:span><text:span text:style-name="T18">começou-se com a implementação de uma biblioteca que lidaria com a interação do usuário com o display do aparelho.</text:span></text:p>
      <text:p text:style-name="P18"><text:tab/>A biblioteca presente no arquivo “<text:span text:style-name="T19">keyboard_utils.asm</text:span>” conta com procedimentos que são utilizados pelos demais arquivos de estado. <text:span text:style-name="T20">A compreensão desse arquivo é de imperiosa importância </text:span>para entender projeto <text:span text:style-name="T20">em sua totalidade.</text:span> <text:span text:style-name="T20">A</text:span>s funcionalidades presentes nela são:</text:p>
      <text:list text:style-name="L2">
        <text:list-item>
          <text:p text:style-name="P19">“<text:span text:style-name="T21">INIT_GUI”: Inicializa a interface e garante o funcionamento conforme o esperado, deve ser chamada na inicialização do firmware;</text:span></text:p>
        </text:list-item>
        <text:list-item>
          <text:p text:style-name="P19"><draw:frame draw:style-name="fr1" draw:name="Image1 Copy 2 Copy 1" text:anchor-type="char" svg:x="-0.7354in" svg:y="-0.7508in" svg:width="8.1693in" svg:height="1.1472in" draw:z-index="6"><draw:image xlink:href="Pictures/100000010000041700000093BBF5567C.png" xlink:type="simple" xlink:show="embed" xlink:actuate="onLoad" draw:mime-type="image/png"/></draw:frame><text:soft-page-break/>“GET_INPUT”: espera uma tecla ser pressionada e retorna o valor associado a ela;</text:p>
        </text:list-item>
        <text:list-item>
          <text:p text:style-name="P20"><text:span text:style-name="T22">“</text:span><text:span text:style-name="T23">WAIT_NO_KEY_PRESSED”: espera até que nenhuma tecla esteja sendo pressionada, esse procedimento é importante para garantir que uma tecla seja registrada apenas uma vez por acionamento, em vez de registrar continuamente;</text:span></text:p>
        </text:list-item>
        <text:list-item>
          <text:p text:style-name="P21">“DISPLAY_NUMBER”: escreve um número no display, é usado para indicar o tempo de cozimento inserido pelo consumidor;</text:p>
        </text:list-item>
        <text:list-item>
          <text:p text:style-name="P21">“CLEAR_DISPLAY”: apaga todos os segmentos do display, é usado para faze-lo piscar, indicando o fim do cozimento; e</text:p>
        </text:list-item>
        <text:list-item>
          <text:p text:style-name="P21">“DISPLAY_OPEN”: escreve “OP” no display, usado para indicar que a porta do micro-ondas está aberta.</text:p>
          <text:p text:style-name="P21"/>
        </text:list-item>
      </text:list>
      <text:p text:style-name="P22">Lidando com o estado </text:p>
      <text:p text:style-name="P23"><text:tab/><text:span text:style-name="T24">Para modelar melhor o funcionamento, usou-se uma máquina de estados finitos, divido em 5 estados principais, sendo eles:</text:span></text:p>
      <text:list text:style-name="L3">
        <text:list-item>
          <text:p text:style-name="P24"><text:span text:style-name="T19">Init</text:span>: inicializa todos os dados para um funcionamento correto;</text:p>
        </text:list-item>
        <text:list-item>
          <text:p text:style-name="P24"><text:span text:style-name="T19">Wait</text:span>: espera ser inserido um tempo de cozimento pelo consumidor, e, ao aperta<text:span text:style-name="T20">r</text:span> o botão de ligar, transiciona para <text:span text:style-name="T19">working</text:span>;</text:p>
        </text:list-item>
        <text:list-item>
          <text:p text:style-name="P25">Working: <text:span text:style-name="T25">realiza o cozimento da comida;</text:span></text:p>
        </text:list-item>
        <text:list-item>
          <text:p text:style-name="P25">Pause: <text:span text:style-name="T25">pausa o cozimento, e espera até ser retomado; e</text:span></text:p>
        </text:list-item>
        <text:list-item>
          <text:p text:style-name="P25">Finish: <text:span text:style-name="T25">indica o fim do cozimento.</text:span></text:p>
        </text:list-item>
      </text:list>
      <text:p text:style-name="P26"><text:tab/><text:span text:style-name="T25">A figura à seguir </text:span><text:span text:style-name="T26">representa</text:span><text:span text:style-name="T25"> o diagrama da máquina de estados com suas transições:</text:span></text:p>
      <text:p text:style-name="P27"><draw:frame draw:style-name="fr1" draw:name="Image2" text:anchor-type="char" svg:x="0.1311in" svg:y="0.2083in" svg:width="6.5575in" svg:height="3.1835in" draw:z-index="5"><draw:image xlink:href="Pictures/10000001000002D500000160C5C0D686.png" xlink:type="simple" xlink:show="embed" xlink:actuate="onLoad" draw:mime-type="image/png"/></draw:frame><text:s text:c="2"/></text:p>
      <text:p text:style-name="P28">Figura 1: Diagrama da máquina de estados.</text:p>
      <text:p text:style-name="P29"><draw:frame draw:style-name="fr1" draw:name="Image1 Copy 2 Copy 2" text:anchor-type="char" svg:x="-0.7272in" svg:y="-0.7756in" svg:width="8.1693in" svg:height="1.1472in" draw:z-index="7"><draw:image xlink:href="Pictures/100000010000041700000093BBF5567C.png" xlink:type="simple" xlink:show="embed" xlink:actuate="onLoad" draw:mime-type="image/png"/></draw:frame><text:soft-page-break/></text:p>
      <text:p text:style-name="P30"><text:tab/>As mudanças de estado <text:span text:style-name="T20">ocorrem</text:span> em função de interações do usuário com o teclado, da abertura e fechame<text:span text:style-name="T20">n</text:span>to da porta, e do temporizador do cozimento. Além disso, podemos modelar as atividades realizadas pelo <text:span text:style-name="T19">firmware</text:span> com o seguinte diagrama:</text:p>
      <text:p text:style-name="P27"><draw:frame draw:style-name="fr2" draw:name="Image3" text:anchor-type="char" svg:width="3.7846in" svg:height="4.5228in" draw:z-index="9"><draw:image xlink:href="Pictures/10000000000001AF00000203B41024F1.jpg" xlink:type="simple" xlink:show="embed" xlink:actuate="onLoad" draw:mime-type="image/jpe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tab/></text:p>
      <text:p text:style-name="P31"><draw:frame text:anchor-type="paragraph" draw:z-index="8" draw:name="Text Frame 3" draw:style-name="gr3" draw:text-style-name="P6" svg:width="6.8059in" svg:height="0.4803in" svg:x="-0.3925in" svg:y="0.5819in"><draw:text-box><text:p><text:span text:style-name="T4"><text:s text:c="3"/>2.2 Manual de Simulação do Firmware: Importância e Diretrizes</text:span></text:p></draw:text-box></draw:frame>Figura 2: Diagrama de atividades do firmware.</text:p>
      <text:p text:style-name="P27"/>
      <text:p text:style-name="P27"/>
      <text:p text:style-name="P32">Requisitos</text:p>
      <text:p text:style-name="P32"><text:tab/><text:span text:style-name="T27">Para executar a simulação do </text:span><text:span text:style-name="T28">firmware</text:span><text:span text:style-name="T27">, basta usar algum simulador do processador </text:span><text:span text:style-name="T28">MIPS </text:span><text:span text:style-name="T29">que disponha de um teclado e visor virtual</text:span><text:span text:style-name="T27">, em particular recomenda-se a utilização do </text:span><text:span text:style-name="T28">MARS </text:span><text:span text:style-name="T27">versão</text:span><text:span text:style-name="T28"> </text:span><text:span text:style-name="T27">4.5, </text:span><text:span text:style-name="T29">que será utilizado neste documento</text:span><text:span text:style-name="T27">.</text:span></text:p>
      <text:p text:style-name="P33"/>
      <text:p text:style-name="P33">Simulação</text:p>
      <text:p text:style-name="P33"><text:tab/><text:span text:style-name="T27">Após aberto o </text:span><text:span text:style-name="T28">software</text:span><text:span text:style-name="T27"> de simulação, basta abrir a pasta contendo os arquivos-fonte do </text:span><text:span text:style-name="T28">firmware, </text:span><text:span text:style-name="T27">o ponto de entrada do programa é o arquivo </text:span><text:span text:style-name="T28">“main.asm”. </text:span><text:span text:style-name="T30">É necessário ativar a opção </text:span><text:span text:style-name="T31">“Assemble all files in directory” </text:span><text:span text:style-name="T30">dentro do menu </text:span><text:span text:style-name="T31">settings</text:span><text:span text:style-name="T30">, o visor e teclado do micro-ondas serã</text:span><text:span text:style-name="T32">o</text:span><text:span text:style-name="T30"> simulado</text:span><text:span text:style-name="T32">s</text:span><text:span text:style-name="T30"> pelo </text:span><text:span text:style-name="T31">Digital Lab Sim</text:span><text:span text:style-name="T30">, disponível na aba </text:span><text:span text:style-name="T31">tools. </text:span><text:span text:style-name="T30">O passo à passo para a simulação é </text:span><text:span text:style-name="T32">descrito a seguir:</text:span></text:p>
      <text:list text:style-name="L4">
        <text:list-item>
          <text:p text:style-name="P34"><draw:frame draw:style-name="fr1" draw:name="Image1 Copy 2 Copy 2 Copy 1" text:anchor-type="char" svg:x="-0.7272in" svg:y="-0.7756in" svg:width="8.1693in" svg:height="1.1472in" draw:z-index="10"><draw:image xlink:href="Pictures/100000010000041700000093BBF5567C.png" xlink:type="simple" xlink:show="embed" xlink:actuate="onLoad" draw:mime-type="image/png"/></draw:frame><text:soft-page-break/>Aperte o botão <text:span text:style-name="T19">“Connect to MIPS” </text:span>no <text:span text:style-name="T19">Digital Lab Sim;</text:span></text:p>
        </text:list-item>
        <text:list-item>
          <text:p text:style-name="P34">Apert<text:span text:style-name="T33">e</text:span> o botão <text:span text:style-name="T19">“Assemble the current file </text:span>[...]<text:span text:style-name="T19">”; </text:span><draw:frame draw:style-name="fr1" draw:name="Image4" text:anchor-type="char" svg:x="3.8543in" svg:y="-0.0291in" svg:width="0.2752in" svg:height="0.2602in" draw:z-index="11"><draw:image xlink:href="Pictures/100000010000002500000023A86AEB44.png" xlink:type="simple" xlink:show="embed" xlink:actuate="onLoad" draw:mime-type="image/png"/></draw:frame></text:p>
        </text:list-item>
        <text:list-item>
          <text:p text:style-name="P35">Aperte no botão de rodar a simulação; <draw:frame draw:style-name="fr1" draw:name="Image5" text:anchor-type="char" svg:x="3.1374in" svg:y="-0.0083in" svg:width="0.252in" svg:height="0.2382in" draw:z-index="12"><draw:image xlink:href="Pictures/1000000100000025000000234738317D.png" xlink:type="simple" xlink:show="embed" xlink:actuate="onLoad" draw:mime-type="image/png"/></draw:frame></text:p>
        </text:list-item>
        <text:list-item>
          <text:p text:style-name="P35">Faça os testes utilizando a interface gráfica do <text:span text:style-name="T19">Digital Lab Sim.</text:span></text:p>
        </text:list-item>
      </text:list>
      <text:p text:style-name="P36"><draw:frame draw:style-name="fr1" draw:name="Image6" text:anchor-type="char" svg:x="0.2083in" svg:y="0in" svg:width="6.4429in" svg:height="2.8598in" draw:z-index="13"><draw:image xlink:href="Pictures/10000001000003CB000001AF959AFB6E.png" xlink:type="simple" xlink:show="embed" xlink:actuate="onLoad" draw:mime-type="image/png"/></draw:frame>Figura 3: Disposição dos botões na simulação do micro-ondas dentro do MARS.</text:p>
      <text:p text:style-name="P37"/>
      <text:p text:style-name="P37">Troubleshooting</text:p>
      <text:p text:style-name="P37"><text:span text:style-name="T27">Alguns erros comuns associados à </text:span><text:span text:style-name="T34">simulação no</text:span><text:span text:style-name="T27"> </text:span><text:span text:style-name="T28">MARS </text:span><text:span text:style-name="T27">e como resolve-los:</text:span></text:p>
      <text:list text:style-name="L5">
        <text:list-item>
          <text:p text:style-name="P38">Simulador parando de responder durante o uso: <text:span text:style-name="T27">esse problema está associado ao </text:span><text:span text:style-name="T28">MARS</text:span><text:span text:style-name="T27"> e não reflete a operação do sistema em </text:span><text:span text:style-name="T28">hardware </text:span><text:span text:style-name="T27">real. </text:span><text:span text:style-name="T32">T</text:span><text:span text:style-name="T27">ente abrir a ferramenta </text:span><text:span text:style-name="T28">Digital Lab Sim </text:span><text:span text:style-name="T27">antes de seguir com a compilação do programa. Diminuir a velocidade de execução para 30 instruções por segundo pode ajudar a reduzir esses erros.</text:span></text:p>
        </text:list-item>
        <text:list-item>
          <text:p text:style-name="P38">Simulação é pausada intermitantemente: <text:span text:style-name="T27">algumas vezes o simulador lança um erro de interrupção, mas isso é associado somente ao </text:span><text:span text:style-name="T28">MARS</text:span><text:span text:style-name="T27"> não interferindo no uso dentro de um processador real. Pode ser facilmente resolvido ao voltar a execução em um passo e retomá-la.</text:span></text:p>
        </text:list-item>
      </text:list>
      <text:p text:style-name="P39"/>
      <text:p text:style-name="P39"><draw:frame text:anchor-type="paragraph" draw:z-index="14" draw:name="Text Frame 4" draw:style-name="gr3" draw:text-style-name="P6" svg:width="3.4016in" svg:height="0.4803in" svg:x="-0.3925in" svg:y="-0.1016in"><draw:text-box><text:p><text:span text:style-name="T4">2. Considerações Finais</text:span></text:p></draw:text-box></draw:frame></text:p>
      <text:p text:style-name="P40">O pacote final de entrega deste projeto para a equipe técnica do cliente INE5411 contempla os seguintes artefatos desenvolvidos para garantir a total operacionalidade e compreensão do sistema:</text:p>
      <text:list text:style-name="L6">
        <text:list-item>
          <text:p text:style-name="P41"><text:span text:style-name="T35">Documentação Técnica:</text:span> Este relatório detalhado, que cobre desde a arquitetura da máquina de estados até o guia prático de simulação e <text:span text:style-name="T36">troubleshooting</text:span>.</text:p>
        </text:list-item>
        <text:list-item>
          <text:p text:style-name="P41"><text:span text:style-name="T35">Arquivos-Fonte:</text:span> O código-fonte do firmware estruturado de forma modular em linguagem Assembly (MIPS). O pacote inclui o arquivo principal de execução (<text:span text:style-name="Source_20_Text">main.asm</text:span>), a biblioteca de controle de interface (<text:span text:style-name="Source_20_Text">keyboard_utils.asm</text:span>) e os respectivos arquivos de <text:soft-page-break/>controle para cada estado do sistema (Init, Wait, Working, Pause e Finish). <text:span text:style-name="T37">Todos os arquivos estão devidamente documentados.</text:span></text:p>
        </text:list-item>
        <text:list-item>
          <text:p text:style-name="P41"><text:span text:style-name="T35">Diagramas de Apoio:</text:span> Representações visuais da lógica de transição de estados (Figura 1) e do fluxo de atividades (Figura 2), fundamentais para futuras manutenções.</text:p>
        </text:list-item>
      </text:list>
      <text:p text:style-name="P42">A arquitetura modular escolhida e documentada visa facilitar a escalabilidade e a manutenção do código. Caso a equipe técnica encontre dificuldades, reporte comportamentos inesperados não cobertos pela seção de <text:span text:style-name="T36">Troubleshooting</text:span>, ou necessite de qualquer suporte técnico complementar, colocamo-nos à disposição.</text:p>
      <text:p text:style-name="P43">Dados para Contato (Suporte Técnico):</text:p>
      <text:list text:style-name="L7">
        <text:list-item>
          <text:p text:style-name="P44"><text:span text:style-name="T35">E-mail:</text:span> <text:span text:style-name="T37">microwave.enterprise@gmail.com</text:span> </text:p>
        </text:list-item>
        <text:list-item>
          <text:p text:style-name="P44"><text:span text:style-name="T35">Telefone/Ramal:</text:span> (48) <text:span text:style-name="T37">1234-1234</text:span></text:p>
        </text:list-item>
      </text:list>
      <text:p text:style-name="P4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mbria" svg:font-family="Cambr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Noto Sans" style:font-family-asian="'Noto Sans'" style:font-family-generic-asian="system" style:font-pitch-asian="variable" style:font-size-asian="12pt" style:font-name-complex="Cambria" style:font-family-complex="Cambria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ea171" officeooo:paragraph-rsid="000ea171"/>
    </style:style>
    <style:page-layout style:name="Mpm1">
      <style:page-layout-properties fo:page-width="8.2681in" fo:page-height="11.6929in" style:num-format="1" style:print-orientation="portrait" fo:margin-top="0.7874in" fo:margin-bottom="0.4717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7T21:56:58.608663489</meta:creation-date>
    <dc:date>2026-06-29T10:49:38.993199751</dc:date>
    <meta:editing-duration>PT41M27S</meta:editing-duration>
    <meta:editing-cycles>7</meta:editing-cycles>
    <meta:generator>LibreOffice/25.2.7.2$Linux_X86_64 LibreOffice_project/520$Build-2</meta:generator>
    <meta:document-statistic meta:table-count="0" meta:image-count="11" meta:object-count="0" meta:page-count="7" meta:paragraph-count="65" meta:word-count="1046" meta:character-count="7621" meta:non-whitespace-character-count="6614"/>
  </office:meta>
</office:document-meta>
</file>